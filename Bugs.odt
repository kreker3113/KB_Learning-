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beginning of system</text:p>
      <text:p text:style-name="Standard">--------- beginning of crash</text:p>
      <text:p text:style-name="Standard">2026-05-10 17:40:02.503 14625-14666 AndroidRuntime <text:s text:c="9"/>pid-14625 <text:s text:c="27"/>E <text:s/>FATAL EXCEPTION: DefaultDispatcher-worker-1</text:p>
      <text:p text:style-name="Standard"><text:s text:c="100"/>Process: dev.kbwallet.app, PID: 14625</text:p>
      <text:p text:style-name="Standard"><text:s text:c="100"/>java.lang.IllegalStateException: Room cannot verify the data integrity. Looks like you've changed schema but forgot to update the version number. You can simply fix this by increasing the version number. Expected identity hash: 9f008f23344d18bb838b55899dca1ff1, found: d1538245f6db419ee761d6a904a17396</text:p>
      <text:p text:style-name="Standard"><text:s text:c="100"/><text:tab/>at androidx.room.BaseRoomConnectionManager.checkIdentity(RoomConnectionManager.kt:262)</text:p>
      <text:p text:style-name="Standard"><text:s text:c="100"/><text:tab/>at androidx.room.BaseRoomConnectionManager.onOpen(RoomConnectionManager.kt:241)</text:p>
      <text:p text:style-name="Standard"><text:s text:c="100"/><text:tab/>at androidx.room.BaseRoomConnectionManager.configureDatabase(RoomConnectionManager.kt:110)</text:p>
      <text:p text:style-name="Standard"><text:s text:c="100"/><text:tab/>at androidx.room.BaseRoomConnectionManager.access$configureDatabase(RoomConnectionManager.kt:37)</text:p>
      <text:p text:style-name="Standard"><text:s text:c="100"/><text:tab/>at androidx.room.BaseRoomConnectionManager$DriverWrapper$open$1.invoke(RoomConnectionManager.kt:69)</text:p>
      <text:p text:style-name="Standard"><text:s text:c="100"/><text:tab/>at androidx.room.BaseRoomConnectionManager$DriverWrapper$open$1.invoke(RoomConnectionManager.kt:59)</text:p>
      <text:p text:style-name="Standard"><text:s text:c="100"/><text:tab/>at androidx.room.concurrent.ExclusiveLock.withLock(ExclusiveLock.kt:48)</text:p>
      <text:p text:style-name="Standard"><text:s text:c="100"/><text:tab/>at androidx.room.BaseRoomConnectionManager$DriverWrapper.open(RoomConnectionManager.kt:59)</text:p>
      <text:p text:style-name="Standard"><text:s text:c="100"/><text:tab/>at androidx.room.coroutines.ConnectionPoolImpl$4.invoke(ConnectionPoolImpl.kt:82)</text:p>
      <text:p text:style-name="Standard"><text:s text:c="100"/><text:tab/>at androidx.room.coroutines.ConnectionPoolImpl$4.invoke(ConnectionPoolImpl.kt:81)</text:p>
      <text:p text:style-name="Standard"><text:s text:c="100"/><text:tab/>at androidx.room.coroutines.Pool.tryOpenNewConnection(ConnectionPoolImpl.kt:221)</text:p>
      <text:p text:style-name="Standard"><text:s text:c="100"/><text:tab/>at androidx.room.coroutines.Pool.acquire(ConnectionPoolImpl.kt:209)</text:p>
      <text:p text:style-name="Standard"><text:s text:c="100"/><text:tab/>at androidx.room.coroutines.ConnectionPoolImpl$acquireWithTimeout$2.invokeSuspend(ConnectionPoolImpl.kt:166)</text:p>
      <text:p text:style-name="Standard"><text:s text:c="100"/><text:tab/>at androidx.room.coroutines.ConnectionPoolImpl$acquireWithTimeout$2.invoke(Unknown Source:8)</text:p>
      <text:p text:style-name="Standard"><text:s text:c="100"/><text:tab/>at androidx.room.coroutines.ConnectionPoolImpl$acquireWithTimeout$2.invoke(Unknown Source:4)</text:p>
      <text:p text:style-name="Standard"><text:s text:c="100"/><text:tab/>at kotlinx.coroutines.intrinsics.UndispatchedKt.startUndispatchedOrReturnIgnoreTimeout(Undispatched.kt:53)</text:p>
      <text:p text:style-name="Standard"><text:s text:c="100"/><text:tab/>at kotlinx.coroutines.TimeoutKt.setupTimeout(Timeout.kt:148)</text:p>
      <text:p text:style-name="Standard"><text:soft-page-break/><text:s text:c="100"/><text:tab/>at kotlinx.coroutines.TimeoutKt.withTimeout(Timeout.kt:43)</text:p>
      <text:p text:style-name="Standard"><text:s text:c="100"/><text:tab/>at kotlinx.coroutines.TimeoutKt.withTimeout-KLykuaI(Timeout.kt:71)</text:p>
      <text:p text:style-name="Standard"><text:s text:c="100"/><text:tab/>at androidx.room.coroutines.ConnectionPoolImpl.useConnection(ConnectionPoolImpl.kt:536)</text:p>
      <text:p text:style-name="Standard"><text:s text:c="100"/><text:tab/>at androidx.room.RoomConnectionManager.useConnection(RoomConnectionManager.android.kt:126)</text:p>
      <text:p text:style-name="Standard"><text:s text:c="100"/><text:tab/>at androidx.room.RoomDatabase.useConnection$room_runtime_release(RoomDatabase.android.kt:583)</text:p>
      <text:p text:style-name="Standard"><text:s text:c="100"/><text:tab/>at androidx.room.util.DBUtil__DBUtil_androidKt$performSuspending$$inlined$compatCoroutineExecute$DBUtil__DBUtil_androidKt$1.invokeSuspend(DBUtil.android.kt:109)</text:p>
      <text:p text:style-name="Standard"><text:s text:c="100"/><text:tab/>at kotlin.coroutines.jvm.internal.BaseContinuationImpl.resumeWith(ContinuationImpl.kt:33)</text:p>
      <text:p text:style-name="Standard"><text:s text:c="100"/><text:tab/>at kotlinx.coroutines.DispatchedTask.run(DispatchedTask.kt:101)</text:p>
      <text:p text:style-name="Standard"><text:s text:c="100"/><text:tab/>at kotlinx.coroutines.internal.LimitedDispatcher$Worker.run(LimitedDispatcher.kt:113)</text:p>
      <text:p text:style-name="Standard"><text:s text:c="100"/><text:tab/>at kotlinx.coroutines.scheduling.TaskImpl.run(Tasks.kt:89)</text:p>
      <text:p text:style-name="Standard"><text:s text:c="100"/><text:tab/>at kotlinx.coroutines.scheduling.CoroutineScheduler.runSafely(CoroutineScheduler.kt:589)</text:p>
      <text:p text:style-name="Standard"><text:s text:c="100"/><text:tab/>at kotlinx.coroutines.scheduling.CoroutineScheduler$Worker.executeTask(CoroutineScheduler.kt:823)</text:p>
      <text:p text:style-name="Standard"><text:s text:c="100"/><text:tab/>at kotlinx.coroutines.scheduling.CoroutineScheduler$Worker.runWorker(CoroutineScheduler.kt:720)</text:p>
      <text:p text:style-name="Standard"><text:s text:c="100"/><text:tab/>at kotlinx.coroutines.scheduling.CoroutineScheduler$Worker.run(CoroutineScheduler.kt:707)</text:p>
      <text:p text:style-name="Standard"><text:s text:c="100"/><text:tab/>Suppressed: kotlinx.coroutines.internal.DiagnosticCoroutineContextException: [StandaloneCoroutine{Cancelling}@5e925d8, Dispatchers.Default]</text:p>
      <text:p text:style-name="Standard">2026-05-10 17:50:13.573 15998-15998 ForceDarkHelper <text:s text:c="8"/>dev.kbwallet.app <text:s text:c="20"/>I <text:s/>ForceDarkConfigInfo: null</text:p>
      <text:p text:style-name="Standard">2026-05-10 17:50:13.770 15998-15998 Looper <text:s text:c="17"/>dev.kbwallet.app <text:s text:c="20"/>W <text:s/>PerfMonitor longMsg : seq=3 plan=17:50:10.936 late=572ms wall=2252ms running=2121ms io=12ms h=android.app.ActivityThread$H w=110 procState=2</text:p>
      <text:p text:style-name="Standard">2026-05-10 17:50:14.015 15998-15998 Looper <text:s text:c="17"/>dev.kbwallet.app <text:s text:c="20"/>W <text:s/>PerfMonitor looperActivity : package=dev.kbwallet.app/.MainActivity time=245ms latency=2832ms running=198ms <text:s/>procState=2 ClientTransaction{ callbacks=[android.app.servertransaction.LaunchActivityItem] lifecycleRequest=android.app.servertransaction.ResumeActivityItem } historyMsgCount=3 (msgIndex=1 wall=574ms seq=1 running=515ms runnable=1ms io=29ms late=6ms h=android.app.ActivityThread$H w=162) (msgIndex=3 wall=2252ms seq=3 running=2121ms io=12ms late=572ms h=android.app.ActivityThread$H w=110)</text:p>
      <text:p text:style-name="Standard">2026-05-10 17:50:14.016 15998-15998 Looper <text:s text:c="17"/>dev.kbwallet.app <text:s text:c="20"/>W <text:s/>PerfMonitor looperActivity : package=dev.kbwallet.app/.MainActivity time=1ms latency=3077ms running=0ms <text:s/>procState=2 ClientTransaction{ callbacks=[android.app.servertransaction.TopResumedActivityChangeItem] } <text:soft-page-break/>historyMsgCount=4 (msgIndex=1 wall=574ms seq=1 running=515ms runnable=1ms io=29ms late=6ms h=android.app.ActivityThread$H w=162) (msgIndex=3 wall=2252ms seq=3 running=2121ms io=12ms late=572ms h=android.app.ActivityThread$H w=110) (msgIndex=4 wall=245ms seq=4 running=198ms runnable=1ms io=3ms late=2832ms h=android.app.ActivityThread$H w=159)</text:p>
      <text:p text:style-name="Standard">2026-05-10 17:50:14.900 15998-15998 Looper <text:s text:c="17"/>dev.kbwallet.app <text:s text:c="20"/>W <text:s/>PerfMonitor doFrame : time=883ms vsyncFrame=0 latency=400ms procState=2 historyMsgCount=5 (msgIndex=1 wall=2252ms seq=3 running=2121ms io=12ms late=572ms h=android.app.ActivityThread$H w=110) (msgIndex=2 wall=245ms seq=4 running=198ms runnable=1ms io=3ms late=2832ms h=android.app.ActivityThread$H w=159)</text:p>
      <text:p text:style-name="Standard">2026-05-10 17:50:14.926 15998-15998 Looper <text:s text:c="17"/>dev.kbwallet.app <text:s text:c="20"/>W <text:s/>PerfMonitor doFrame : time=2ms vsyncFrame=0 latency=808ms procState=2 historyMsgCount=6 (msgIndex=1 wall=883ms seq=8 running=787ms io=3ms late=400ms h=android.view.Choreographer$FrameHandler c=android.view.Choreographer$FrameDisplayEventReceiver)</text:p>
      <text:p text:style-name="Standard">2026-05-10 17:50:17.913 15998-15998 Looper <text:s text:c="17"/>dev.kbwallet.app <text:s text:c="20"/>W <text:s/>PerfMonitor doFrame : time=651ms vsyncFrame=0 latency=3ms procState=2 historyMsgCount=5</text:p>
      <text:p text:style-name="Standard">2026-05-10 17:50:17.970 15998-15998 Looper <text:s text:c="17"/>dev.kbwallet.app <text:s text:c="20"/>W <text:s/>PerfMonitor doFrame : time=35ms vsyncFrame=0 latency=659ms procState=2 historyMsgCount=3 (msgIndex=1 wall=651ms seq=82 running=616ms io=3ms late=3ms h=android.view.Choreographer$FrameHandler c=android.view.Choreographer$FrameDisplayEventReceiver)</text:p>
      <text:p text:style-name="Standard">2026-05-10 17:50:23.481 15998-16041 AndroidRuntime <text:s text:c="9"/>dev.kbwallet.app <text:s text:c="20"/>E <text:s/>FATAL EXCEPTION: DefaultDispatcher-worker-2</text:p>
      <text:p text:style-name="Standard"><text:s text:c="100"/>Process: dev.kbwallet.app, PID: 15998</text:p>
      <text:p text:style-name="Standard"><text:s text:c="100"/>java.lang.IllegalStateException: Room cannot verify the data integrity. Looks like you've changed schema but forgot to update the version number. You can simply fix this by increasing the version number. Expected identity hash: 9f008f23344d18bb838b55899dca1ff1, found: d1538245f6db419ee761d6a904a17396</text:p>
      <text:p text:style-name="Standard"><text:s text:c="100"/><text:tab/>at androidx.room.BaseRoomConnectionManager.checkIdentity(RoomConnectionManager.kt:262)</text:p>
      <text:p text:style-name="Standard"><text:s text:c="100"/><text:tab/>at androidx.room.BaseRoomConnectionManager.onOpen(RoomConnectionManager.kt:241)</text:p>
      <text:p text:style-name="Standard"><text:s text:c="100"/><text:tab/>at androidx.room.BaseRoomConnectionManager.configureDatabase(RoomConnectionManager.kt:110)</text:p>
      <text:p text:style-name="Standard"><text:s text:c="100"/><text:tab/>at androidx.room.BaseRoomConnectionManager.access$configureDatabase(RoomConnectionManager.kt:37)</text:p>
      <text:p text:style-name="Standard"><text:s text:c="100"/><text:tab/>at androidx.room.BaseRoomConnectionManager$DriverWrapper$open$1.invoke(RoomConnectionManager.kt:69)</text:p>
      <text:p text:style-name="Standard"><text:s text:c="100"/><text:tab/>at androidx.room.BaseRoomConnectionManager$DriverWrapper$open$1.invoke(RoomConnectionManager.kt:59)</text:p>
      <text:p text:style-name="Standard"><text:s text:c="100"/><text:tab/>at androidx.room.concurrent.ExclusiveLock.withLock(ExclusiveLock.kt:48)</text:p>
      <text:p text:style-name="Standard"><text:s text:c="100"/><text:tab/>at androidx.room.BaseRoomConnectionManager$DriverWrapper.open(RoomConnectionManager.kt:59)</text:p>
      <text:p text:style-name="Standard"><text:soft-page-break/><text:s text:c="100"/><text:tab/>at androidx.room.coroutines.ConnectionPoolImpl$4.invoke(ConnectionPoolImpl.kt:82)</text:p>
      <text:p text:style-name="Standard"><text:s text:c="100"/><text:tab/>at androidx.room.coroutines.ConnectionPoolImpl$4.invoke(ConnectionPoolImpl.kt:81)</text:p>
      <text:p text:style-name="Standard"><text:s text:c="100"/><text:tab/>at androidx.room.coroutines.Pool.tryOpenNewConnection(ConnectionPoolImpl.kt:221)</text:p>
      <text:p text:style-name="Standard"><text:s text:c="100"/><text:tab/>at androidx.room.coroutines.Pool.acquire(ConnectionPoolImpl.kt:209)</text:p>
      <text:p text:style-name="Standard"><text:s text:c="100"/><text:tab/>at androidx.room.coroutines.ConnectionPoolImpl$acquireWithTimeout$2.invokeSuspend(ConnectionPoolImpl.kt:166)</text:p>
      <text:p text:style-name="Standard"><text:s text:c="100"/><text:tab/>at androidx.room.coroutines.ConnectionPoolImpl$acquireWithTimeout$2.invoke(Unknown Source:8)</text:p>
      <text:p text:style-name="Standard"><text:s text:c="100"/><text:tab/>at androidx.room.coroutines.ConnectionPoolImpl$acquireWithTimeout$2.invoke(Unknown Source:4)</text:p>
      <text:p text:style-name="Standard"><text:s text:c="100"/><text:tab/>at kotlinx.coroutines.intrinsics.UndispatchedKt.startUndispatchedOrReturnIgnoreTimeout(Undispatched.kt:53)</text:p>
      <text:p text:style-name="Standard"><text:s text:c="100"/><text:tab/>at kotlinx.coroutines.TimeoutKt.setupTimeout(Timeout.kt:148)</text:p>
      <text:p text:style-name="Standard"><text:s text:c="100"/><text:tab/>at kotlinx.coroutines.TimeoutKt.withTimeout(Timeout.kt:43)</text:p>
      <text:p text:style-name="Standard"><text:s text:c="100"/><text:tab/>at kotlinx.coroutines.TimeoutKt.withTimeout-KLykuaI(Timeout.kt:71)</text:p>
      <text:p text:style-name="Standard"><text:s text:c="100"/><text:tab/>at androidx.room.coroutines.ConnectionPoolImpl.useConnection(ConnectionPoolImpl.kt:536)</text:p>
      <text:p text:style-name="Standard"><text:s text:c="100"/><text:tab/>at androidx.room.RoomConnectionManager.useConnection(RoomConnectionManager.android.kt:126)</text:p>
      <text:p text:style-name="Standard"><text:s text:c="100"/><text:tab/>at androidx.room.RoomDatabase.useConnection$room_runtime_release(RoomDatabase.android.kt:583)</text:p>
      <text:p text:style-name="Standard"><text:s text:c="100"/><text:tab/>at androidx.room.util.DBUtil__DBUtil_androidKt$performSuspending$$inlined$compatCoroutineExecute$DBUtil__DBUtil_androidKt$1.invokeSuspend(DBUtil.android.kt:109)</text:p>
      <text:p text:style-name="Standard"><text:s text:c="100"/><text:tab/>at kotlin.coroutines.jvm.internal.BaseContinuationImpl.resumeWith(ContinuationImpl.kt:33)</text:p>
      <text:p text:style-name="Standard"><text:s text:c="100"/><text:tab/>at kotlinx.coroutines.DispatchedTask.run(DispatchedTask.kt:101)</text:p>
      <text:p text:style-name="Standard"><text:s text:c="100"/><text:tab/>at kotlinx.coroutines.internal.LimitedDispatcher$Worker.run(LimitedDispatcher.kt:113)</text:p>
      <text:p text:style-name="Standard"><text:s text:c="100"/><text:tab/>at kotlinx.coroutines.scheduling.TaskImpl.run(Tasks.kt:89)</text:p>
      <text:p text:style-name="Standard"><text:s text:c="100"/><text:tab/>at kotlinx.coroutines.scheduling.CoroutineScheduler.runSafely(CoroutineScheduler.kt:589)</text:p>
      <text:p text:style-name="Standard"><text:s text:c="100"/><text:tab/>at kotlinx.coroutines.scheduling.CoroutineScheduler$Worker.executeTask(CoroutineScheduler.kt:823)</text:p>
      <text:p text:style-name="Standard"><text:s text:c="100"/><text:tab/>at kotlinx.coroutines.scheduling.CoroutineScheduler$Worker.runWorker(CoroutineScheduler.kt:720)</text:p>
      <text:p text:style-name="Standard"><text:s text:c="100"/><text:tab/>at kotlinx.coroutines.scheduling.CoroutineScheduler$Worker.run(CoroutineScheduler.kt:707)</text:p>
      <text:p text:style-name="Standard"><text:soft-page-break/><text:s text:c="100"/><text:tab/>Suppressed: kotlinx.coroutines.internal.DiagnosticCoroutineContextException: [StandaloneCoroutine{Cancelling}@ed7ca89, Dispatchers.Default]</text:p>
      <text:p text:style-name="Standard">2026-05-10 17:50:23.491 15998-16041 OOMEventManagerFK <text:s text:c="6"/>dev.kbwallet.app <text:s text:c="20"/>D <text:s/>checkEventAndDumpForJE: 0</text:p>
      <text:p text:style-name="Standard">2026-05-10 17:56:55.895 17099-17099 ForceDarkHelper <text:s text:c="8"/>dev.kbwallet.app <text:s text:c="20"/>I <text:s/>ForceDarkConfigInfo: null</text:p>
      <text:p text:style-name="Standard">2026-05-10 17:56:56.096 17099-17099 Looper <text:s text:c="17"/>dev.kbwallet.app <text:s text:c="20"/>W <text:s/>PerfMonitor longMsg : seq=3 plan=17:56:53.556 late=112ms wall=2424ms running=2289ms runnable=3ms io=7ms h=android.app.ActivityThread$H w=110 procState=2</text:p>
      <text:p text:style-name="Standard">2026-05-10 17:56:56.970 17099-17099 BpBinder <text:s text:c="15"/>dev.kbwallet.app <text:s text:c="20"/>W <text:s/>Slow Binder: BpBinder transact took 625 ms, interface=android.view.accessibility.IAccessibilityManager, code=3 oneway=false</text:p>
      <text:p text:style-name="Standard">2026-05-10 17:56:57.140 17099-17099 Activity <text:s text:c="15"/>dev.kbwallet.app <text:s text:c="20"/>W <text:s/>Slow Operation: Activity dev.kbwallet.app/.MainActivity onCreate took 867ms</text:p>
      <text:p text:style-name="Standard">2026-05-10 17:56:57.192 17099-17099 Looper <text:s text:c="17"/>dev.kbwallet.app <text:s text:c="20"/>W <text:s/>PerfMonitor longMsg : seq=4 plan=17:56:53.560 late=2537ms wall=1094ms running=243ms runnable=70ms io=1ms h=android.app.ActivityThread$H w=159 procState=2</text:p>
      <text:p text:style-name="Standard">2026-05-10 17:56:57.193 17099-17099 Looper <text:s text:c="17"/>dev.kbwallet.app <text:s text:c="20"/>W <text:s/>PerfMonitor looperActivity : package=dev.kbwallet.app/.MainActivity time=1094ms latency=2537ms running=243ms <text:s/>procState=2 ClientTransaction{ callbacks=[android.app.servertransaction.LaunchActivityItem] lifecycleRequest=android.app.servertransaction.ResumeActivityItem } historyMsgCount=3 (msgIndex=1 wall=116ms seq=1 running=79ms runnable=2ms io=27ms late=16ms h=android.app.ActivityThread$H w=162) (msgIndex=3 wall=2424ms seq=3 running=2289ms runnable=3ms io=7ms late=112ms h=android.app.ActivityThread$H w=110)</text:p>
      <text:p text:style-name="Standard">2026-05-10 17:56:57.194 17099-17099 Looper <text:s text:c="17"/>dev.kbwallet.app <text:s text:c="20"/>W <text:s/>PerfMonitor looperActivity : package=dev.kbwallet.app/.MainActivity time=0ms latency=3633ms running=0ms <text:s/>procState=2 ClientTransaction{ callbacks=[android.app.servertransaction.TopResumedActivityChangeItem] } historyMsgCount=4 (msgIndex=1 wall=116ms seq=1 running=79ms runnable=2ms io=27ms late=16ms h=android.app.ActivityThread$H w=162) (msgIndex=3 wall=2424ms seq=3 running=2289ms runnable=3ms io=7ms late=112ms h=android.app.ActivityThread$H w=110) (msgIndex=4 wall=1094ms seq=4 running=243ms runnable=70ms io=1ms late=2537ms h=android.app.ActivityThread$H w=159)</text:p>
      <text:p text:style-name="Standard">2026-05-10 17:56:58.224 17099-17099 Looper <text:s text:c="17"/>dev.kbwallet.app <text:s text:c="20"/>W <text:s/>PerfMonitor longMsg : seq=8 plan=17:56:55.942 late=1252ms wall=1028ms running=855ms runnable=66ms io=3ms h=android.view.Choreographer$FrameHandler c=android.view.Choreographer$FrameDisplayEventReceiver procState=2</text:p>
      <text:p text:style-name="Standard">2026-05-10 17:56:58.224 17099-17099 Looper <text:s text:c="17"/>dev.kbwallet.app <text:s text:c="20"/>W <text:s/>PerfMonitor doFrame : time=1028ms vsyncFrame=0 latency=1252ms procState=2 historyMsgCount=5 (msgIndex=1 wall=2424ms seq=3 running=2289ms runnable=3ms io=7ms late=112ms h=android.app.ActivityThread$H w=110) (msgIndex=2 wall=1094ms seq=4 running=243ms runnable=70ms io=1ms late=2537ms h=android.app.ActivityThread$H w=159)</text:p>
      <text:p text:style-name="Standard">2026-05-10 17:56:58.251 17099-17099 Looper <text:s text:c="17"/>dev.kbwallet.app <text:s text:c="20"/>W <text:s/>PerfMonitor doFrame : time=3ms vsyncFrame=0 latency=875ms procState=2 historyMsgCount=10 (msgIndex=1 wall=1028ms seq=8 running=855ms runnable=66ms io=3ms late=1252ms h=android.view.Choreographer$FrameHandler c=android.view.Choreographer$FrameDisplayEventReceiver)</text:p>
      <text:p text:style-name="Standard">2026-05-10 17:57:19.491 17099-17099 Looper <text:s text:c="17"/>dev.kbwallet.app <text:s text:c="20"/>W <text:s/>PerfMonitor doFrame : time=830ms vsyncFrame=0 latency=16ms procState=2 historyMsgCount=4</text:p>
      <text:p text:style-name="Standard"><text:soft-page-break/>2026-05-10 17:57:19.551 17099-17099 Looper <text:s text:c="17"/>dev.kbwallet.app <text:s text:c="20"/>W <text:s/>PerfMonitor doFrame : time=39ms vsyncFrame=0 latency=833ms procState=2 historyMsgCount=5 (msgIndex=1 wall=830ms seq=137 running=786ms runnable=1ms io=4ms late=16ms h=android.view.Choreographer$FrameHandler c=android.view.Choreographer$FrameDisplayEventReceiver)</text:p>
      <text:p text:style-name="Standard">2026-05-10 17:57:21.773 17099-17589 AndroidRuntime <text:s text:c="9"/>dev.kbwallet.app <text:s text:c="20"/>E <text:s/>FATAL EXCEPTION: DefaultDispatcher-worker-3</text:p>
      <text:p text:style-name="Standard"><text:s text:c="100"/>Process: dev.kbwallet.app, PID: 17099</text:p>
      <text:p text:style-name="Standard"><text:s text:c="100"/>java.lang.IllegalStateException: Room cannot verify the data integrity. Looks like you've changed schema but forgot to update the version number. You can simply fix this by increasing the version number. Expected identity hash: 9f008f23344d18bb838b55899dca1ff1, found: d1538245f6db419ee761d6a904a17396</text:p>
      <text:p text:style-name="Standard"><text:s text:c="100"/><text:tab/>at androidx.room.BaseRoomConnectionManager.checkIdentity(RoomConnectionManager.kt:262)</text:p>
      <text:p text:style-name="Standard"><text:s text:c="100"/><text:tab/>at androidx.room.BaseRoomConnectionManager.onOpen(RoomConnectionManager.kt:241)</text:p>
      <text:p text:style-name="Standard"><text:s text:c="100"/><text:tab/>at androidx.room.BaseRoomConnectionManager.configureDatabase(RoomConnectionManager.kt:110)</text:p>
      <text:p text:style-name="Standard"><text:s text:c="100"/><text:tab/>at androidx.room.BaseRoomConnectionManager.access$configureDatabase(RoomConnectionManager.kt:37)</text:p>
      <text:p text:style-name="Standard"><text:s text:c="100"/><text:tab/>at androidx.room.BaseRoomConnectionManager$DriverWrapper$open$1.invoke(RoomConnectionManager.kt:69)</text:p>
      <text:p text:style-name="Standard"><text:s text:c="100"/><text:tab/>at androidx.room.BaseRoomConnectionManager$DriverWrapper$open$1.invoke(RoomConnectionManager.kt:59)</text:p>
      <text:p text:style-name="Standard"><text:s text:c="100"/><text:tab/>at androidx.room.concurrent.ExclusiveLock.withLock(ExclusiveLock.kt:48)</text:p>
      <text:p text:style-name="Standard"><text:s text:c="100"/><text:tab/>at androidx.room.BaseRoomConnectionManager$DriverWrapper.open(RoomConnectionManager.kt:59)</text:p>
      <text:p text:style-name="Standard"><text:s text:c="100"/><text:tab/>at androidx.room.coroutines.ConnectionPoolImpl$4.invoke(ConnectionPoolImpl.kt:82)</text:p>
      <text:p text:style-name="Standard"><text:s text:c="100"/><text:tab/>at androidx.room.coroutines.ConnectionPoolImpl$4.invoke(ConnectionPoolImpl.kt:81)</text:p>
      <text:p text:style-name="Standard"><text:s text:c="100"/><text:tab/>at androidx.room.coroutines.Pool.tryOpenNewConnection(ConnectionPoolImpl.kt:221)</text:p>
      <text:p text:style-name="Standard"><text:s text:c="100"/><text:tab/>at androidx.room.coroutines.Pool.acquire(ConnectionPoolImpl.kt:209)</text:p>
      <text:p text:style-name="Standard"><text:s text:c="100"/><text:tab/>at androidx.room.coroutines.ConnectionPoolImpl$acquireWithTimeout$2.invokeSuspend(ConnectionPoolImpl.kt:166)</text:p>
      <text:p text:style-name="Standard"><text:s text:c="100"/><text:tab/>at androidx.room.coroutines.ConnectionPoolImpl$acquireWithTimeout$2.invoke(Unknown Source:8)</text:p>
      <text:p text:style-name="Standard"><text:s text:c="100"/><text:tab/>at androidx.room.coroutines.ConnectionPoolImpl$acquireWithTimeout$2.invoke(Unknown Source:4)</text:p>
      <text:p text:style-name="Standard"><text:s text:c="100"/><text:tab/>at kotlinx.coroutines.intrinsics.UndispatchedKt.startUndispatchedOrReturnIgnoreTimeout(Undispatched.kt:53)</text:p>
      <text:p text:style-name="Standard"><text:soft-page-break/><text:s text:c="100"/><text:tab/>at kotlinx.coroutines.TimeoutKt.setupTimeout(Timeout.kt:148)</text:p>
      <text:p text:style-name="Standard"><text:s text:c="100"/><text:tab/>at kotlinx.coroutines.TimeoutKt.withTimeout(Timeout.kt:43)</text:p>
      <text:p text:style-name="Standard"><text:s text:c="100"/><text:tab/>at kotlinx.coroutines.TimeoutKt.withTimeout-KLykuaI(Timeout.kt:71)</text:p>
      <text:p text:style-name="Standard"><text:s text:c="100"/><text:tab/>at androidx.room.coroutines.ConnectionPoolImpl.useConnection(ConnectionPoolImpl.kt:536)</text:p>
      <text:p text:style-name="Standard"><text:s text:c="100"/><text:tab/>at androidx.room.RoomConnectionManager.useConnection(RoomConnectionManager.android.kt:126)</text:p>
      <text:p text:style-name="Standard"><text:s text:c="100"/><text:tab/>at androidx.room.RoomDatabase.useConnection$room_runtime_release(RoomDatabase.android.kt:583)</text:p>
      <text:p text:style-name="Standard"><text:s text:c="100"/><text:tab/>at androidx.room.util.DBUtil__DBUtil_androidKt$performSuspending$$inlined$compatCoroutineExecute$DBUtil__DBUtil_androidKt$1.invokeSuspend(DBUtil.android.kt:109)</text:p>
      <text:p text:style-name="Standard"><text:s text:c="100"/><text:tab/>at kotlin.coroutines.jvm.internal.BaseContinuationImpl.resumeWith(ContinuationImpl.kt:33)</text:p>
      <text:p text:style-name="Standard"><text:s text:c="100"/><text:tab/>at kotlinx.coroutines.DispatchedTask.run(DispatchedTask.kt:101)</text:p>
      <text:p text:style-name="Standard"><text:s text:c="100"/><text:tab/>at kotlinx.coroutines.internal.LimitedDispatcher$Worker.run(LimitedDispatcher.kt:113)</text:p>
      <text:p text:style-name="Standard"><text:s text:c="100"/><text:tab/>at kotlinx.coroutines.scheduling.TaskImpl.run(Tasks.kt:89)</text:p>
      <text:p text:style-name="Standard"><text:s text:c="100"/><text:tab/>at kotlinx.coroutines.scheduling.CoroutineScheduler.runSafely(CoroutineScheduler.kt:589)</text:p>
      <text:p text:style-name="Standard"><text:s text:c="100"/><text:tab/>at kotlinx.coroutines.scheduling.CoroutineScheduler$Worker.executeTask(CoroutineScheduler.kt:823)</text:p>
      <text:p text:style-name="Standard"><text:s text:c="100"/><text:tab/>at kotlinx.coroutines.scheduling.CoroutineScheduler$Worker.runWorker(CoroutineScheduler.kt:720)</text:p>
      <text:p text:style-name="Standard"><text:s text:c="100"/><text:tab/>at kotlinx.coroutines.scheduling.CoroutineScheduler$Worker.run(CoroutineScheduler.kt:707)</text:p>
      <text:p text:style-name="Standard"><text:s text:c="100"/><text:tab/>Suppressed: kotlinx.coroutines.internal.DiagnosticCoroutineContextException: [StandaloneCoroutine{Cancelling}@b8e6154, Dispatchers.Default]</text:p>
      <text:p text:style-name="Standard">2026-05-10 17:57:21.784 17099-17589 OOMEventManagerFK <text:s text:c="6"/>dev.kbwallet.app <text:s text:c="20"/>D <text:s/>checkEventAndDumpForJE: 0</text:p>
      <text:p text:style-name="Standard">2026-05-10 17:57:29.219 17615-17615 ForceDarkHelper <text:s text:c="8"/>dev.kbwallet.app <text:s text:c="20"/>I <text:s/>ForceDarkConfigInfo: null</text:p>
      <text:p text:style-name="Standard">2026-05-10 17:57:29.411 17615-17615 Looper <text:s text:c="17"/>dev.kbwallet.app <text:s text:c="20"/>W <text:s/>PerfMonitor longMsg : seq=3 plan=17:57:26.982 late=71ms wall=2354ms running=2227ms runnable=3ms h=android.app.ActivityThread$H w=110 procState=2</text:p>
      <text:p text:style-name="Standard">2026-05-10 17:57:29.665 17615-17615 Looper <text:s text:c="17"/>dev.kbwallet.app <text:s text:c="20"/>W <text:s/>PerfMonitor looperActivity : package=dev.kbwallet.app/.MainActivity time=253ms latency=2424ms running=208ms <text:s/>procState=2 ClientTransaction{ callbacks=[android.app.servertransaction.LaunchActivityItem] lifecycleRequest=android.app.servertransaction.ResumeActivityItem } historyMsgCount=3 (msgIndex=1 wall=81ms seq=1 running=72ms runnable=1ms io=1ms late=6ms h=android.app.ActivityThread$H w=162) (msgIndex=3 wall=2354ms seq=3 running=2227ms runnable=3ms late=71ms h=android.app.ActivityThread$H w=110)</text:p>
      <text:p text:style-name="Standard"><text:soft-page-break/>2026-05-10 17:57:29.666 17615-17615 Looper <text:s text:c="17"/>dev.kbwallet.app <text:s text:c="20"/>W <text:s/>PerfMonitor looperActivity : package=dev.kbwallet.app/.MainActivity time=1ms latency=2678ms running=0ms <text:s/>procState=2 ClientTransaction{ callbacks=[android.app.servertransaction.TopResumedActivityChangeItem] } historyMsgCount=4 (msgIndex=1 wall=81ms seq=1 running=72ms runnable=1ms io=1ms late=6ms h=android.app.ActivityThread$H w=162) (msgIndex=3 wall=2354ms seq=3 running=2227ms runnable=3ms late=71ms h=android.app.ActivityThread$H w=110) (msgIndex=4 wall=253ms seq=4 running=208ms runnable=1ms late=2424ms h=android.app.ActivityThread$H w=159)</text:p>
      <text:p text:style-name="Standard">2026-05-10 17:57:30.568 17615-17615 Looper <text:s text:c="17"/>dev.kbwallet.app <text:s text:c="20"/>W <text:s/>PerfMonitor doFrame : time=901ms vsyncFrame=0 latency=410ms procState=2 historyMsgCount=5 (msgIndex=1 wall=2354ms seq=3 running=2227ms runnable=3ms late=71ms h=android.app.ActivityThread$H w=110) (msgIndex=2 wall=253ms seq=4 running=208ms runnable=1ms late=2424ms h=android.app.ActivityThread$H w=159)</text:p>
      <text:p text:style-name="Standard">2026-05-10 17:57:30.593 17615-17615 Looper <text:s text:c="17"/>dev.kbwallet.app <text:s text:c="20"/>W <text:s/>PerfMonitor doFrame : time=2ms vsyncFrame=0 latency=802ms procState=2 historyMsgCount=6 (msgIndex=1 wall=901ms seq=8 running=805ms late=410ms h=android.view.Choreographer$FrameHandler c=android.view.Choreographer$FrameDisplayEventReceiver)</text:p>
      <text:p text:style-name="Standard">2026-05-10 18:00:01.749 18565-18565 ForceDarkHelper <text:s text:c="8"/>dev.kbwallet.app <text:s text:c="20"/>I <text:s/>ForceDarkConfigInfo: null</text:p>
      <text:p text:style-name="Standard">2026-05-10 18:00:01.935 18565-18565 Looper <text:s text:c="17"/>dev.kbwallet.app <text:s text:c="20"/>W <text:s/>PerfMonitor longMsg : seq=3 plan=17:59:59.627 late=73ms wall=2231ms running=2108ms runnable=1ms io=6ms h=android.app.ActivityThread$H w=110 procState=2</text:p>
      <text:p text:style-name="Standard">2026-05-10 18:00:02.156 18565-18565 Looper <text:s text:c="17"/>dev.kbwallet.app <text:s text:c="20"/>W <text:s/>PerfMonitor looperActivity : package=dev.kbwallet.app/.MainActivity time=220ms latency=2306ms running=179ms <text:s/>procState=2 ClientTransaction{ callbacks=[android.app.servertransaction.LaunchActivityItem] lifecycleRequest=android.app.servertransaction.ResumeActivityItem } historyMsgCount=3 (msgIndex=1 wall=76ms seq=1 running=60ms runnable=1ms io=12ms late=4ms h=android.app.ActivityThread$H w=162) (msgIndex=3 wall=2231ms seq=3 running=2108ms runnable=1ms io=6ms late=73ms h=android.app.ActivityThread$H w=110)</text:p>
      <text:p text:style-name="Standard">2026-05-10 18:00:02.157 18565-18565 Looper <text:s text:c="17"/>dev.kbwallet.app <text:s text:c="20"/>W <text:s/>PerfMonitor looperActivity : package=dev.kbwallet.app/.MainActivity time=0ms latency=2526ms running=0ms <text:s/>procState=2 ClientTransaction{ callbacks=[android.app.servertransaction.TopResumedActivityChangeItem] } historyMsgCount=4 (msgIndex=1 wall=76ms seq=1 running=60ms runnable=1ms io=12ms late=4ms h=android.app.ActivityThread$H w=162) (msgIndex=3 wall=2231ms seq=3 running=2108ms runnable=1ms io=6ms late=73ms h=android.app.ActivityThread$H w=110) (msgIndex=4 wall=220ms seq=4 running=179ms runnable=1ms late=2306ms h=android.app.ActivityThread$H w=159)</text:p>
      <text:p text:style-name="Standard">2026-05-10 18:00:03.010 18565-18565 Looper <text:s text:c="17"/>dev.kbwallet.app <text:s text:c="20"/>W <text:s/>PerfMonitor doFrame : time=853ms vsyncFrame=0 latency=367ms procState=2 historyMsgCount=5 (msgIndex=1 wall=2231ms seq=3 running=2108ms runnable=1ms io=6ms late=73ms h=android.app.ActivityThread$H w=110) (msgIndex=2 wall=220ms seq=4 running=179ms runnable=1ms late=2306ms h=android.app.ActivityThread$H w=159)</text:p>
      <text:p text:style-name="Standard">2026-05-10 18:00:03.036 18565-18565 Looper <text:s text:c="17"/>dev.kbwallet.app <text:s text:c="20"/>W <text:s/>PerfMonitor doFrame : time=3ms vsyncFrame=0 latency=777ms procState=2 historyMsgCount=6 (msgIndex=1 wall=853ms seq=8 running=737ms runnable=2ms late=367ms h=android.view.Choreographer$FrameHandler c=android.view.Choreographer$FrameDisplayEventReceiver)</text:p>
      <text:p text:style-name="Standard"><text:soft-page-break/>2026-05-10 18:00:08.041 18565-18565 Looper <text:s text:c="17"/>dev.kbwallet.app <text:s text:c="20"/>W <text:s/>PerfMonitor doFrame : time=600ms vsyncFrame=0 latency=12ms procState=2 historyMsgCount=4</text:p>
      <text:p text:style-name="Standard">2026-05-10 18:00:08.094 18565-18565 Looper <text:s text:c="17"/>dev.kbwallet.app <text:s text:c="20"/>W <text:s/>PerfMonitor doFrame : time=35ms vsyncFrame=0 latency=614ms procState=2 historyMsgCount=6 (msgIndex=1 wall=600ms seq=76 running=570ms io=3ms late=12ms h=android.view.Choreographer$FrameHandler c=android.view.Choreographer$FrameDisplayEventReceiver)</text:p>
      <text:p text:style-name="Standard">2026-05-10 18:00:18.168 18565-18565 Looper <text:s text:c="17"/>dev.kbwallet.app <text:s text:c="20"/>W <text:s/>PerfMonitor doFrame : time=324ms vsyncFrame=0 latency=21ms procState=2 historyMsgCount=1</text:p>
      <text:p text:style-name="Standard">2026-05-10 18:00:18.204 18565-18565 Looper <text:s text:c="17"/>dev.kbwallet.app <text:s text:c="20"/>W <text:s/>PerfMonitor doFrame : time=36ms vsyncFrame=0 latency=312ms procState=2 historyMsgCount=1 (msgIndex=1 wall=324ms seq=155 running=307ms late=21ms h=android.view.Choreographer$FrameHandler c=android.view.Choreographer$FrameDisplayEventReceiver)</text:p>
      <text:p text:style-name="Standard">2026-05-10 18:00:19.962 18565-18565 AndroidRuntime <text:s text:c="9"/>dev.kbwallet.app <text:s text:c="20"/>E <text:s/>FATAL EXCEPTION: main</text:p>
      <text:p text:style-name="Standard"><text:s text:c="100"/>Process: dev.kbwallet.app, PID: 18565</text:p>
      <text:p text:style-name="Standard"><text:s text:c="100"/>java.lang.IllegalStateException: Room cannot verify the data integrity. Looks like you've changed schema but forgot to update the version number. You can simply fix this by increasing the version number. Expected identity hash: 9f008f23344d18bb838b55899dca1ff1, found: d1538245f6db419ee761d6a904a17396</text:p>
      <text:p text:style-name="Standard"><text:s text:c="100"/><text:tab/>at androidx.room.BaseRoomConnectionManager.checkIdentity(RoomConnectionManager.kt:262)</text:p>
      <text:p text:style-name="Standard"><text:s text:c="100"/><text:tab/>at androidx.room.BaseRoomConnectionManager.onOpen(RoomConnectionManager.kt:241)</text:p>
      <text:p text:style-name="Standard"><text:s text:c="100"/><text:tab/>at androidx.room.BaseRoomConnectionManager.configureDatabase(RoomConnectionManager.kt:110)</text:p>
      <text:p text:style-name="Standard"><text:s text:c="100"/><text:tab/>at androidx.room.BaseRoomConnectionManager.access$configureDatabase(RoomConnectionManager.kt:37)</text:p>
      <text:p text:style-name="Standard"><text:s text:c="100"/><text:tab/>at androidx.room.BaseRoomConnectionManager$DriverWrapper$open$1.invoke(RoomConnectionManager.kt:69)</text:p>
      <text:p text:style-name="Standard"><text:s text:c="100"/><text:tab/>at androidx.room.BaseRoomConnectionManager$DriverWrapper$open$1.invoke(RoomConnectionManager.kt:59)</text:p>
      <text:p text:style-name="Standard"><text:s text:c="100"/><text:tab/>at androidx.room.concurrent.ExclusiveLock.withLock(ExclusiveLock.kt:48)</text:p>
      <text:p text:style-name="Standard"><text:s text:c="100"/><text:tab/>at androidx.room.BaseRoomConnectionManager$DriverWrapper.open(RoomConnectionManager.kt:59)</text:p>
      <text:p text:style-name="Standard"><text:s text:c="100"/><text:tab/>at androidx.room.coroutines.ConnectionPoolImpl$4.invoke(ConnectionPoolImpl.kt:82)</text:p>
      <text:p text:style-name="Standard"><text:s text:c="100"/><text:tab/>at androidx.room.coroutines.ConnectionPoolImpl$4.invoke(ConnectionPoolImpl.kt:81)</text:p>
      <text:p text:style-name="Standard"><text:s text:c="100"/><text:tab/>at androidx.room.coroutines.Pool.tryOpenNewConnection(ConnectionPoolImpl.kt:221)</text:p>
      <text:p text:style-name="Standard"><text:s text:c="100"/><text:tab/>at androidx.room.coroutines.Pool.acquire(ConnectionPoolImpl.kt:209)</text:p>
      <text:p text:style-name="Standard"><text:soft-page-break/><text:s text:c="100"/><text:tab/>at androidx.room.coroutines.ConnectionPoolImpl$acquireWithTimeout$2.invokeSuspend(ConnectionPoolImpl.kt:166)</text:p>
      <text:p text:style-name="Standard"><text:s text:c="100"/><text:tab/>at androidx.room.coroutines.ConnectionPoolImpl$acquireWithTimeout$2.invoke(Unknown Source:8)</text:p>
      <text:p text:style-name="Standard"><text:s text:c="100"/><text:tab/>at androidx.room.coroutines.ConnectionPoolImpl$acquireWithTimeout$2.invoke(Unknown Source:4)</text:p>
      <text:p text:style-name="Standard"><text:s text:c="100"/><text:tab/>at kotlinx.coroutines.intrinsics.UndispatchedKt.startUndispatchedOrReturnIgnoreTimeout(Undispatched.kt:53)</text:p>
      <text:p text:style-name="Standard"><text:s text:c="100"/><text:tab/>at kotlinx.coroutines.TimeoutKt.setupTimeout(Timeout.kt:148)</text:p>
      <text:p text:style-name="Standard"><text:s text:c="100"/><text:tab/>at kotlinx.coroutines.TimeoutKt.withTimeout(Timeout.kt:43)</text:p>
      <text:p text:style-name="Standard"><text:s text:c="100"/><text:tab/>at kotlinx.coroutines.TimeoutKt.withTimeout-KLykuaI(Timeout.kt:71)</text:p>
      <text:p text:style-name="Standard"><text:s text:c="100"/><text:tab/>at androidx.room.coroutines.ConnectionPoolImpl.useConnection(ConnectionPoolImpl.kt:536)</text:p>
      <text:p text:style-name="Standard"><text:s text:c="100"/><text:tab/>at androidx.room.RoomConnectionManager.useConnection(RoomConnectionManager.android.kt:126)</text:p>
      <text:p text:style-name="Standard"><text:s text:c="100"/><text:tab/>at androidx.room.RoomDatabase.useConnection$room_runtime_release(RoomDatabase.android.kt:583)</text:p>
      <text:p text:style-name="Standard"><text:s text:c="100"/><text:tab/>at androidx.room.util.DBUtil__DBUtil_androidKt$performSuspending$$inlined$compatCoroutineExecute$DBUtil__DBUtil_androidKt$1.invokeSuspend(DBUtil.android.kt:109)</text:p>
      <text:p text:style-name="Standard"><text:s text:c="100"/><text:tab/>at kotlin.coroutines.jvm.internal.BaseContinuationImpl.resumeWith(ContinuationImpl.kt:33)</text:p>
      <text:p text:style-name="Standard"><text:s text:c="100"/><text:tab/>at kotlinx.coroutines.DispatchedTask.run(DispatchedTask.kt:101)</text:p>
      <text:p text:style-name="Standard"><text:s text:c="100"/><text:tab/>at kotlinx.coroutines.internal.LimitedDispatcher$Worker.run(LimitedDispatcher.kt:113)</text:p>
      <text:p text:style-name="Standard"><text:s text:c="100"/><text:tab/>at kotlinx.coroutines.scheduling.TaskImpl.run(Tasks.kt:89)</text:p>
      <text:p text:style-name="Standard"><text:s text:c="100"/><text:tab/>at kotlinx.coroutines.scheduling.CoroutineScheduler.runSafely(CoroutineScheduler.kt:589)</text:p>
      <text:p text:style-name="Standard"><text:s text:c="100"/><text:tab/>at kotlinx.coroutines.scheduling.CoroutineScheduler$Worker.executeTask(CoroutineScheduler.kt:823)</text:p>
      <text:p text:style-name="Standard"><text:s text:c="100"/><text:tab/>at kotlinx.coroutines.scheduling.CoroutineScheduler$Worker.runWorker(CoroutineScheduler.kt:720)</text:p>
      <text:p text:style-name="Standard"><text:s text:c="100"/><text:tab/>at kotlinx.coroutines.scheduling.CoroutineScheduler$Worker.run(CoroutineScheduler.kt:707)</text:p>
      <text:p text:style-name="Standard"><text:s text:c="100"/><text:tab/>Suppressed: kotlinx.coroutines.internal.DiagnosticCoroutineContextException: [StandaloneCoroutine{Cancelling}@6aec161, Dispatchers.Main.immediate]</text:p>
      <text:p text:style-name="Standard">2026-05-10 18:00:19.970 18565-18565 OOMEventManagerFK <text:s text:c="6"/>dev.kbwallet.app <text:s text:c="20"/>D <text:s/>checkEventAndDumpForJE: 0</text:p>
      <text:p text:style-name="Standard">2026-05-10 18:00:24.944 18631-18631 ForceDarkHelper <text:s text:c="8"/>dev.kbwallet.app <text:s text:c="20"/>I <text:s/>ForceDarkConfigInfo: null</text:p>
      <text:p text:style-name="Standard"><text:soft-page-break/>2026-05-10 18:00:25.131 18631-18631 Looper <text:s text:c="17"/>dev.kbwallet.app <text:s text:c="20"/>W <text:s/>PerfMonitor longMsg : seq=3 plan=18:00:22.727 late=83ms wall=2318ms running=2195ms runnable=3ms h=android.app.ActivityThread$H w=110 procState=2</text:p>
      <text:p text:style-name="Standard">2026-05-10 18:00:25.381 18631-18631 Looper <text:s text:c="17"/>dev.kbwallet.app <text:s text:c="20"/>W <text:s/>PerfMonitor looperActivity : package=dev.kbwallet.app/.MainActivity time=249ms latency=2402ms running=204ms <text:s/>procState=2 ClientTransaction{ callbacks=[android.app.servertransaction.LaunchActivityItem] lifecycleRequest=android.app.servertransaction.ResumeActivityItem } historyMsgCount=3 (msgIndex=1 wall=86ms seq=1 running=75ms runnable=2ms io=2ms late=5ms h=android.app.ActivityThread$H w=162) (msgIndex=3 wall=2318ms seq=3 running=2195ms runnable=3ms late=83ms h=android.app.ActivityThread$H w=110)</text:p>
      <text:p text:style-name="Standard">2026-05-10 18:00:25.383 18631-18631 Looper <text:s text:c="17"/>dev.kbwallet.app <text:s text:c="20"/>W <text:s/>PerfMonitor looperActivity : package=dev.kbwallet.app/.MainActivity time=1ms latency=2652ms running=0ms <text:s/>procState=2 ClientTransaction{ callbacks=[android.app.servertransaction.TopResumedActivityChangeItem] } historyMsgCount=4 (msgIndex=1 wall=86ms seq=1 running=75ms runnable=2ms io=2ms late=5ms h=android.app.ActivityThread$H w=162) (msgIndex=3 wall=2318ms seq=3 running=2195ms runnable=3ms late=83ms h=android.app.ActivityThread$H w=110) (msgIndex=4 wall=249ms seq=4 running=204ms late=2402ms h=android.app.ActivityThread$H w=159)</text:p>
      <text:p text:style-name="Standard">2026-05-10 18:00:26.285 18631-18631 Looper <text:s text:c="17"/>dev.kbwallet.app <text:s text:c="20"/>W <text:s/>PerfMonitor doFrame : time=901ms vsyncFrame=0 latency=392ms procState=2 historyMsgCount=5 (msgIndex=1 wall=2318ms seq=3 running=2195ms runnable=3ms late=83ms h=android.app.ActivityThread$H w=110) (msgIndex=2 wall=249ms seq=4 running=204ms late=2402ms h=android.app.ActivityThread$H w=159)</text:p>
      <text:p text:style-name="Standard">2026-05-10 18:00:26.313 18631-18631 Looper <text:s text:c="17"/>dev.kbwallet.app <text:s text:c="20"/>W <text:s/>PerfMonitor doFrame : time=2ms vsyncFrame=0 latency=820ms procState=2 historyMsgCount=6 (msgIndex=1 wall=901ms seq=8 running=796ms late=392ms h=android.view.Choreographer$FrameHandler c=android.view.Choreographer$FrameDisplayEventReceiver)</text:p>
      <text:p text:style-name="Standard">2026-05-10 18:00:29.440 18631-18631 Looper <text:s text:c="17"/>dev.kbwallet.app <text:s text:c="20"/>W <text:s/>PerfMonitor doFrame : time=598ms vsyncFrame=0 latency=7ms procState=2 historyMsgCount=6</text:p>
      <text:p text:style-name="Standard">2026-05-10 18:00:29.494 18631-18631 Looper <text:s text:c="17"/>dev.kbwallet.app <text:s text:c="20"/>W <text:s/>PerfMonitor doFrame : time=35ms vsyncFrame=0 latency=608ms procState=2 historyMsgCount=2 (msgIndex=1 wall=598ms seq=79 running=569ms late=7ms h=android.view.Choreographer$FrameHandler c=android.view.Choreographer$FrameDisplayEventReceiver)</text:p>
      <text:p text:style-name="Standard">2026-05-10 18:00:31.084 18631-18671 AndroidRuntime <text:s text:c="9"/>dev.kbwallet.app <text:s text:c="20"/>E <text:s/>FATAL EXCEPTION: DefaultDispatcher-worker-1</text:p>
      <text:p text:style-name="Standard"><text:s text:c="100"/>Process: dev.kbwallet.app, PID: 18631</text:p>
      <text:p text:style-name="Standard"><text:s text:c="100"/>java.lang.IllegalStateException: Room cannot verify the data integrity. Looks like you've changed schema but forgot to update the version number. You can simply fix this by increasing the version number. Expected identity hash: 9f008f23344d18bb838b55899dca1ff1, found: d1538245f6db419ee761d6a904a17396</text:p>
      <text:p text:style-name="Standard"><text:s text:c="100"/><text:tab/>at androidx.room.BaseRoomConnectionManager.checkIdentity(RoomConnectionManager.kt:262)</text:p>
      <text:p text:style-name="Standard"><text:s text:c="100"/><text:tab/>at androidx.room.BaseRoomConnectionManager.onOpen(RoomConnectionManager.kt:241)</text:p>
      <text:p text:style-name="Standard"><text:s text:c="100"/><text:tab/>at androidx.room.BaseRoomConnectionManager.configureDatabase(RoomConnectionManager.kt:110)</text:p>
      <text:p text:style-name="Standard"><text:soft-page-break/><text:s text:c="100"/><text:tab/>at androidx.room.BaseRoomConnectionManager.access$configureDatabase(RoomConnectionManager.kt:37)</text:p>
      <text:p text:style-name="Standard"><text:s text:c="100"/><text:tab/>at androidx.room.BaseRoomConnectionManager$DriverWrapper$open$1.invoke(RoomConnectionManager.kt:69)</text:p>
      <text:p text:style-name="Standard"><text:s text:c="100"/><text:tab/>at androidx.room.BaseRoomConnectionManager$DriverWrapper$open$1.invoke(RoomConnectionManager.kt:59)</text:p>
      <text:p text:style-name="Standard"><text:s text:c="100"/><text:tab/>at androidx.room.concurrent.ExclusiveLock.withLock(ExclusiveLock.kt:48)</text:p>
      <text:p text:style-name="Standard"><text:s text:c="100"/><text:tab/>at androidx.room.BaseRoomConnectionManager$DriverWrapper.open(RoomConnectionManager.kt:59)</text:p>
      <text:p text:style-name="Standard"><text:s text:c="100"/><text:tab/>at androidx.room.coroutines.ConnectionPoolImpl$4.invoke(ConnectionPoolImpl.kt:82)</text:p>
      <text:p text:style-name="Standard"><text:s text:c="100"/><text:tab/>at androidx.room.coroutines.ConnectionPoolImpl$4.invoke(ConnectionPoolImpl.kt:81)</text:p>
      <text:p text:style-name="Standard"><text:s text:c="100"/><text:tab/>at androidx.room.coroutines.Pool.tryOpenNewConnection(ConnectionPoolImpl.kt:221)</text:p>
      <text:p text:style-name="Standard"><text:s text:c="100"/><text:tab/>at androidx.room.coroutines.Pool.acquire(ConnectionPoolImpl.kt:209)</text:p>
      <text:p text:style-name="Standard"><text:s text:c="100"/><text:tab/>at androidx.room.coroutines.ConnectionPoolImpl$acquireWithTimeout$2.invokeSuspend(ConnectionPoolImpl.kt:166)</text:p>
      <text:p text:style-name="Standard"><text:s text:c="100"/><text:tab/>at androidx.room.coroutines.ConnectionPoolImpl$acquireWithTimeout$2.invoke(Unknown Source:8)</text:p>
      <text:p text:style-name="Standard"><text:s text:c="100"/><text:tab/>at androidx.room.coroutines.ConnectionPoolImpl$acquireWithTimeout$2.invoke(Unknown Source:4)</text:p>
      <text:p text:style-name="Standard"><text:s text:c="100"/><text:tab/>at kotlinx.coroutines.intrinsics.UndispatchedKt.startUndispatchedOrReturnIgnoreTimeout(Undispatched.kt:53)</text:p>
      <text:p text:style-name="Standard"><text:s text:c="100"/><text:tab/>at kotlinx.coroutines.TimeoutKt.setupTimeout(Timeout.kt:148)</text:p>
      <text:p text:style-name="Standard"><text:s text:c="100"/><text:tab/>at kotlinx.coroutines.TimeoutKt.withTimeout(Timeout.kt:43)</text:p>
      <text:p text:style-name="Standard"><text:s text:c="100"/><text:tab/>at kotlinx.coroutines.TimeoutKt.withTimeout-KLykuaI(Timeout.kt:71)</text:p>
      <text:p text:style-name="Standard"><text:s text:c="100"/><text:tab/>at androidx.room.coroutines.ConnectionPoolImpl.useConnection(ConnectionPoolImpl.kt:536)</text:p>
      <text:p text:style-name="Standard"><text:s text:c="100"/><text:tab/>at androidx.room.RoomConnectionManager.useConnection(RoomConnectionManager.android.kt:126)</text:p>
      <text:p text:style-name="Standard"><text:s text:c="100"/><text:tab/>at androidx.room.RoomDatabase.useConnection$room_runtime_release(RoomDatabase.android.kt:583)</text:p>
      <text:p text:style-name="Standard"><text:s text:c="100"/><text:tab/>at androidx.room.util.DBUtil__DBUtil_androidKt$performSuspending$$inlined$compatCoroutineExecute$DBUtil__DBUtil_androidKt$1.invokeSuspend(DBUtil.android.kt:109)</text:p>
      <text:p text:style-name="Standard"><text:s text:c="100"/><text:tab/>at kotlin.coroutines.jvm.internal.BaseContinuationImpl.resumeWith(ContinuationImpl.kt:33)</text:p>
      <text:p text:style-name="Standard"><text:soft-page-break/><text:s text:c="100"/><text:tab/>at kotlinx.coroutines.DispatchedTask.run(DispatchedTask.kt:101)</text:p>
      <text:p text:style-name="Standard"><text:s text:c="100"/><text:tab/>at kotlinx.coroutines.internal.LimitedDispatcher$Worker.run(LimitedDispatcher.kt:113)</text:p>
      <text:p text:style-name="Standard"><text:s text:c="100"/><text:tab/>at kotlinx.coroutines.scheduling.TaskImpl.run(Tasks.kt:89)</text:p>
      <text:p text:style-name="Standard"><text:s text:c="100"/><text:tab/>at kotlinx.coroutines.scheduling.CoroutineScheduler.runSafely(CoroutineScheduler.kt:589)</text:p>
      <text:p text:style-name="Standard"><text:s text:c="100"/><text:tab/>at kotlinx.coroutines.scheduling.CoroutineScheduler$Worker.executeTask(CoroutineScheduler.kt:823)</text:p>
      <text:p text:style-name="Standard"><text:s text:c="100"/><text:tab/>at kotlinx.coroutines.scheduling.CoroutineScheduler$Worker.runWorker(CoroutineScheduler.kt:720)</text:p>
      <text:p text:style-name="Standard"><text:s text:c="100"/><text:tab/>at kotlinx.coroutines.scheduling.CoroutineScheduler$Worker.run(CoroutineScheduler.kt:707)</text:p>
      <text:p text:style-name="Standard"><text:s text:c="100"/><text:tab/>Suppressed: kotlinx.coroutines.internal.DiagnosticCoroutineContextException: [StandaloneCoroutine{Cancelling}@93aacb, Dispatchers.Default]</text:p>
      <text:p text:style-name="Standard">2026-05-10 18:00:31.099 18631-18671 OOMEventManagerFK <text:s text:c="6"/>dev.kbwallet.app <text:s text:c="20"/>D <text:s/>checkEventAndDumpForJE: 0</text:p>
      <text:p text:style-name="Standard">--------- beginning of 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0T18:11:34.315868808</meta:creation-date>
    <dc:date>2026-05-10T18:11:36.134667180</dc:date>
    <meta:editing-duration>PT2S</meta:editing-duration>
    <meta:editing-cycles>1</meta:editing-cycles>
    <meta:document-statistic meta:table-count="0" meta:image-count="0" meta:object-count="0" meta:page-count="13" meta:paragraph-count="226" meta:word-count="1664" meta:character-count="49825" meta:non-whitespace-character-count="29329"/>
    <meta:generator>LibreOffice/25.8.6.2$Linux_X86_64 LibreOffice_project/580$Build-2</meta:generator>
  </office:meta>
</office:document-meta>
</file>